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5cm" table:align="left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2.02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584cm" table:align="left"/>
    </style:style>
    <style:style style:name="Table2.A" style:family="table-column">
      <style:table-column-properties style:column-width="1.695cm"/>
    </style:style>
    <style:style style:name="Table2.B" style:family="table-column">
      <style:table-column-properties style:column-width="1.88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paKo – Complete Website Blueprint</text:h>
      <text:h text:style-name="Heading_20_3" text:outline-level="3">AI-Powered Language Learning &amp; Translation Portal</text:h>
      <text:p text:style-name="Text_20_body"><text:span text:style-name="Strong_20_Emphasis">Project Type:</text:span> Full Stack Web Application<text:line-break/><text:span text:style-name="Strong_20_Emphasis">Website Name:</text:span> <text:span text:style-name="Strong_20_Emphasis">spaKo</text:span> (Inspired by a talking parrot 🦜)<text:line-break/><text:span text:style-name="Strong_20_Emphasis">Theme:</text:span> Light Theme + Metallic UI Design<text:line-break/><text:span text:style-name="Strong_20_Emphasis">Frontend:</text:span> HTML5, CSS3, JavaScript<text:line-break/><text:span text:style-name="Strong_20_Emphasis">Backend:</text:span> Node.js + Express.js (Recommended) or PHP<text:line-break/><text:span text:style-name="Strong_20_Emphasis">Database:</text:span> MySQL (Optional but Recommended)</text:p>
      <text:p text:style-name="Horizontal_20_Line"/>
      <text:h text:style-name="Heading_20_1" text:outline-level="1">1. Project Overview</text:h>
      <text:h text:style-name="Heading_20_2" text:outline-level="2">Purpose</text:h>
      <text:p text:style-name="Text_20_body">spaKo is a modern web platform that combines:</text:p>
      <text:list text:style-name="L1">
        <text:list-item>
          <text:p text:style-name="P1">Language Translation</text:p>
        </text:list-item>
        <text:list-item>
          <text:p text:style-name="P1">Language Learning</text:p>
        </text:list-item>
        <text:list-item>
          <text:p text:style-name="P1">Vocabulary Building</text:p>
        </text:list-item>
        <text:list-item>
          <text:p text:style-name="P1">Grammar Practice</text:p>
        </text:list-item>
        <text:list-item>
          <text:p text:style-name="P1">Pronunciation Training</text:p>
        </text:list-item>
        <text:list-item>
          <text:p text:style-name="P1">AI Chat Learning</text:p>
        </text:list-item>
        <text:list-item>
          <text:p text:style-name="P1">User Progress Tracking</text:p>
        </text:list-item>
      </text:list>
      <text:p text:style-name="Text_20_body">The concept is based on a smart multilingual parrot that can translate and teach languages interactively.</text:p>
      <text:p text:style-name="Horizontal_20_Line"/>
      <text:h text:style-name="Heading_20_1" text:outline-level="1">2. Target Users</text:h>
      <text:h text:style-name="Heading_20_3" text:outline-level="3">Primary Users</text:h>
      <text:list text:style-name="L2">
        <text:list-item>
          <text:p text:style-name="P2">Students</text:p>
        </text:list-item>
        <text:list-item>
          <text:p text:style-name="P2">Travelers</text:p>
        </text:list-item>
        <text:list-item>
          <text:p text:style-name="P2">Teachers</text:p>
        </text:list-item>
        <text:list-item>
          <text:p text:style-name="P2">Language Enthusiasts</text:p>
        </text:list-item>
        <text:list-item>
          <text:p text:style-name="P2">Professionals</text:p>
        </text:list-item>
      </text:list>
      <text:h text:style-name="Heading_20_3" text:outline-level="3"><text:soft-page-break/>Age Range</text:h>
      <text:list text:style-name="L3">
        <text:list-item>
          <text:p text:style-name="P3">13 – 60+</text:p>
        </text:list-item>
      </text:list>
      <text:p text:style-name="Horizontal_20_Line"/>
      <text:h text:style-name="Heading_20_1" text:outline-level="1">3. Brand Identity</text:h>
      <text:h text:style-name="Heading_20_2" text:outline-level="2">Website Name</text:h>
      <text:p text:style-name="Text_20_body"><text:span text:style-name="Strong_20_Emphasis">spaKo</text:span></text:p>
      <text:h text:style-name="Heading_20_2" text:outline-level="2">Meaning</text:h>
      <text:p text:style-name="Text_20_body">Inspired by a talking parrot that can speak multiple languages.</text:p>
      <text:h text:style-name="Heading_20_2" text:outline-level="2">Mascot</text:h>
      <text:p text:style-name="Text_20_body">Metallic robotic parrot.</text:p>
      <text:h text:style-name="Heading_20_2" text:outline-level="2">Slogan</text:h>
      <text:p text:style-name="Text_20_body">"Speak Beyond Borders"</text:p>
      <text:p text:style-name="Text_20_body">Alternative:</text:p>
      <text:p text:style-name="Text_20_body">"Learn. Translate. Connect."</text:p>
      <text:p text:style-name="Horizontal_20_Line"/>
      <text:h text:style-name="Heading_20_1" text:outline-level="1">4. Color Palette</text:h>
      <text:h text:style-name="Heading_20_3" text:outline-level="3">Primary Color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Color</text:p>
            </table:table-cell>
          </table:table-row>
        </table:table-header-rows>
        <table:table-row>
          <table:table-cell table:style-name="Table1.A1" office:value-type="string">
            <text:p text:style-name="Table_20_Contents">White Background</text:p>
          </table:table-cell>
          <table:table-cell table:style-name="Table1.A1" office:value-type="string">
            <text:p text:style-name="Table_20_Contents">#FFFFFF</text:p>
          </table:table-cell>
        </table:table-row>
        <table:table-row>
          <table:table-cell table:style-name="Table1.A1" office:value-type="string">
            <text:p text:style-name="Table_20_Contents">Metallic Silver</text:p>
          </table:table-cell>
          <table:table-cell table:style-name="Table1.A1" office:value-type="string">
            <text:p text:style-name="Table_20_Contents">#C0C0C0</text:p>
          </table:table-cell>
        </table:table-row>
        <table:table-row>
          <table:table-cell table:style-name="Table1.A1" office:value-type="string">
            <text:p text:style-name="Table_20_Contents">Light Steel</text:p>
          </table:table-cell>
          <table:table-cell table:style-name="Table1.A1" office:value-type="string">
            <text:p text:style-name="Table_20_Contents">#D8DEE9</text:p>
          </table:table-cell>
        </table:table-row>
        <table:table-row>
          <table:table-cell table:style-name="Table1.A1" office:value-type="string">
            <text:p text:style-name="Table_20_Contents">Platinum</text:p>
          </table:table-cell>
          <table:table-cell table:style-name="Table1.A1" office:value-type="string">
            <text:p text:style-name="Table_20_Contents">#E5E4E2</text:p>
          </table:table-cell>
        </table:table-row>
        <table:table-row>
          <table:table-cell table:style-name="Table1.A1" office:value-type="string">
            <text:p text:style-name="Table_20_Contents">Soft Blue</text:p>
          </table:table-cell>
          <table:table-cell table:style-name="Table1.A1" office:value-type="string">
            <text:p text:style-name="Table_20_Contents">#6DA9FF</text:p>
          </table:table-cell>
        </table:table-row>
        <table:table-row>
          <table:table-cell table:style-name="Table1.A1" office:value-type="string">
            <text:p text:style-name="Table_20_Contents">Dark Text</text:p>
          </table:table-cell>
          <table:table-cell table:style-name="Table1.A1" office:value-type="string">
            <text:p text:style-name="Table_20_Contents">#2C2C2C</text:p>
          </table:table-cell>
        </table:table-row>
      </table:table>
      <text:h text:style-name="Heading_20_3" text:outline-level="3">Accent Color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urpose</text:p>
            </table:table-cell>
            <table:table-cell table:style-name="Table2.A1" office:value-type="string">
              <text:p text:style-name="Table_20_Heading">Color</text:p>
            </table:table-cell>
          </table:table-row>
        </table:table-header-rows>
        <table:table-row>
          <table:table-cell table:style-name="Table2.A1" office:value-type="string">
            <text:p text:style-name="Table_20_Contents">Success</text:p>
          </table:table-cell>
          <table:table-cell table:style-name="Table2.A1" office:value-type="string">
            <text:p text:style-name="Table_20_Contents">#00C853</text:p>
          </table:table-cell>
        </table:table-row>
        <table:table-row>
          <table:table-cell table:style-name="Table2.A1" office:value-type="string">
            <text:p text:style-name="Table_20_Contents">Warning</text:p>
          </table:table-cell>
          <table:table-cell table:style-name="Table2.A1" office:value-type="string">
            <text:p text:style-name="Table_20_Contents">#FFD600</text:p>
          </table:table-cell>
        </table:table-row>
        <table:table-row>
          <table:table-cell table:style-name="Table2.A1" office:value-type="string">
            <text:p text:style-name="Table_20_Contents">Error</text:p>
          </table:table-cell>
          <table:table-cell table:style-name="Table2.A1" office:value-type="string">
            <text:p text:style-name="Table_20_Contents">#FF5252</text:p>
          </table:table-cell>
        </table:table-row>
      </table:table>
      <text:p text:style-name="Horizontal_20_Line"/>
      <text:h text:style-name="Heading_20_1" text:outline-level="1"><text:soft-page-break/>5. Typography</text:h>
      <text:h text:style-name="Heading_20_2" text:outline-level="2">Headings</text:h>
      <text:list text:style-name="L4">
        <text:list-item>
          <text:p text:style-name="P4">Poppins Bold</text:p>
        </text:list-item>
      </text:list>
      <text:h text:style-name="Heading_20_2" text:outline-level="2">Paragraphs</text:h>
      <text:list text:style-name="L5">
        <text:list-item>
          <text:p text:style-name="P5">Inter</text:p>
        </text:list-item>
        <text:list-item>
          <text:p text:style-name="P5">Roboto</text:p>
        </text:list-item>
      </text:list>
      <text:h text:style-name="Heading_20_2" text:outline-level="2">Buttons</text:h>
      <text:list text:style-name="L6">
        <text:list-item>
          <text:p text:style-name="P6">Poppins Semi-Bold</text:p>
        </text:list-item>
      </text:list>
      <text:p text:style-name="Horizontal_20_Line"/>
      <text:h text:style-name="Heading_20_1" text:outline-level="1">6. UI Design Style</text:h>
      <text:h text:style-name="Heading_20_2" text:outline-level="2">Theme</text:h>
      <text:p text:style-name="Text_20_body">Light Metallic Glass UI</text:p>
      <text:h text:style-name="Heading_20_3" text:outline-level="3">Design Elements</text:h>
      <text:list text:style-name="L7">
        <text:list-item>
          <text:p text:style-name="P7">Metallic gradients</text:p>
        </text:list-item>
        <text:list-item>
          <text:p text:style-name="P7">Glassmorphism cards</text:p>
        </text:list-item>
        <text:list-item>
          <text:p text:style-name="P7">Soft shadows</text:p>
        </text:list-item>
        <text:list-item>
          <text:p text:style-name="P7">Rounded corners</text:p>
        </text:list-item>
        <text:list-item>
          <text:p text:style-name="P7">Smooth animations</text:p>
        </text:list-item>
        <text:list-item>
          <text:p text:style-name="P7">Floating icons</text:p>
        </text:list-item>
      </text:list>
      <text:h text:style-name="Heading_20_3" text:outline-level="3">Border Radius</text:h>
      <text:p text:style-name="P8"><text:span text:style-name="Source_20_Text">border-radius: 15px;</text:span></text:p>
      <text:h text:style-name="Heading_20_3" text:outline-level="3">Shadow</text:h>
      <text:p text:style-name="P8"><text:span text:style-name="Source_20_Text">box-shadow: 0 10px 30px rgba(0,0,0,0.1);</text:span></text:p>
      <text:p text:style-name="Horizontal_20_Line"/>
      <text:h text:style-name="Heading_20_1" text:outline-level="1">7. Website Structure</text:h>
      <text:p text:style-name="Preformatted_20_Text"><text:span text:style-name="Source_20_Text">Home</text:span></text:p>
      <text:p text:style-name="Preformatted_20_Text"><text:span text:style-name="Source_20_Text">│</text:span></text:p>
      <text:p text:style-name="Preformatted_20_Text"><text:soft-page-break/><text:span text:style-name="Source_20_Text">├── Login</text:span></text:p>
      <text:p text:style-name="Preformatted_20_Text"><text:span text:style-name="Source_20_Text">├── Register</text:span></text:p>
      <text:p text:style-name="Preformatted_20_Text"><text:span text:style-name="Source_20_Text">├── Dashboard</text:span></text:p>
      <text:p text:style-name="Preformatted_20_Text"><text:span text:style-name="Source_20_Text">│</text:span></text:p>
      <text:p text:style-name="Preformatted_20_Text"><text:span text:style-name="Source_20_Text">├── Translator</text:span></text:p>
      <text:p text:style-name="Preformatted_20_Text"><text:span text:style-name="Source_20_Text">├── Language Learning</text:span></text:p>
      <text:p text:style-name="Preformatted_20_Text"><text:span text:style-name="Source_20_Text">├── AI Tutor</text:span></text:p>
      <text:p text:style-name="Preformatted_20_Text"><text:span text:style-name="Source_20_Text">├── Vocabulary</text:span></text:p>
      <text:p text:style-name="Preformatted_20_Text"><text:span text:style-name="Source_20_Text">├── Grammar Center</text:span></text:p>
      <text:p text:style-name="Preformatted_20_Text"><text:span text:style-name="Source_20_Text">├── Pronunciation</text:span></text:p>
      <text:p text:style-name="Preformatted_20_Text"><text:span text:style-name="Source_20_Text">├── Progress Tracker</text:span></text:p>
      <text:p text:style-name="Preformatted_20_Text"><text:span text:style-name="Source_20_Text">├── Community Forum</text:span></text:p>
      <text:p text:style-name="Preformatted_20_Text"><text:span text:style-name="Source_20_Text">├── Profile</text:span></text:p>
      <text:p text:style-name="Preformatted_20_Text"><text:span text:style-name="Source_20_Text">│</text:span></text:p>
      <text:p text:style-name="P8"><text:span text:style-name="Source_20_Text">└── Settings</text:span></text:p>
      <text:p text:style-name="Horizontal_20_Line"/>
      <text:h text:style-name="Heading_20_1" text:outline-level="1">8. Home Page</text:h>
      <text:h text:style-name="Heading_20_2" text:outline-level="2">Hero Section</text:h>
      <text:p text:style-name="Text_20_body">Contains:</text:p>
      <text:list text:style-name="L8">
        <text:list-item>
          <text:p text:style-name="P9">Large Logo</text:p>
        </text:list-item>
        <text:list-item>
          <text:p text:style-name="P9">Animated Metallic Parrot</text:p>
        </text:list-item>
        <text:list-item>
          <text:p text:style-name="P9">Search Bar</text:p>
        </text:list-item>
        <text:list-item>
          <text:p text:style-name="P9">Translate Button</text:p>
        </text:list-item>
        <text:list-item>
          <text:p text:style-name="P9">Learn Languages Button</text:p>
        </text:list-item>
      </text:list>
      <text:h text:style-name="Heading_20_3" text:outline-level="3">CTA Buttons</text:h>
      <text:list text:style-name="L9">
        <text:list-item>
          <text:p text:style-name="P10">Start Learning</text:p>
        </text:list-item>
        <text:list-item>
          <text:p text:style-name="P10">Translate Now</text:p>
        </text:list-item>
      </text:list>
      <text:p text:style-name="Horizontal_20_Line"/>
      <text:h text:style-name="Heading_20_2" text:outline-level="2">Statistics Section</text:h>
      <text:p text:style-name="Text_20_body">Shows:</text:p>
      <text:list text:style-name="L10">
        <text:list-item>
          <text:p text:style-name="P11">Total Languages</text:p>
        </text:list-item>
        <text:list-item>
          <text:p text:style-name="P11">Active Users</text:p>
        </text:list-item>
        <text:list-item>
          <text:p text:style-name="P11">Daily Translations</text:p>
        </text:list-item>
        <text:list-item>
          <text:p text:style-name="P11">Lessons Available</text:p>
        </text:list-item>
      </text:list>
      <text:p text:style-name="Text_20_body">Example:</text:p>
      <text:p text:style-name="Preformatted_20_Text"><text:span text:style-name="Source_20_Text">120+</text:span></text:p>
      <text:p text:style-name="Preformatted_20_Text"><text:span text:style-name="Source_20_Text">Languages</text:span></text:p>
      <text:p text:style-name="Preformatted_20_Text"><text:soft-page-break/></text:p>
      <text:p text:style-name="Preformatted_20_Text"><text:span text:style-name="Source_20_Text">50K+</text:span></text:p>
      <text:p text:style-name="Preformatted_20_Text"><text:span text:style-name="Source_20_Text">Users</text:span></text:p>
      <text:p text:style-name="Preformatted_20_Text"/>
      <text:p text:style-name="Preformatted_20_Text"><text:span text:style-name="Source_20_Text">1M+</text:span></text:p>
      <text:p text:style-name="P8"><text:span text:style-name="Source_20_Text">Translations</text:span></text:p>
      <text:p text:style-name="Horizontal_20_Line"/>
      <text:h text:style-name="Heading_20_2" text:outline-level="2">Features Section</text:h>
      <text:p text:style-name="Text_20_body">Cards:</text:p>
      <text:h text:style-name="Heading_20_3" text:outline-level="3">Translator</text:h>
      <text:p text:style-name="Text_20_body">Instant translation.</text:p>
      <text:h text:style-name="Heading_20_3" text:outline-level="3">Learning Center</text:h>
      <text:p text:style-name="Text_20_body">Interactive lessons.</text:p>
      <text:h text:style-name="Heading_20_3" text:outline-level="3">Vocabulary Builder</text:h>
      <text:p text:style-name="Text_20_body">Word memorization.</text:p>
      <text:h text:style-name="Heading_20_3" text:outline-level="3">AI Tutor</text:h>
      <text:p text:style-name="Text_20_body">Chat-based learning.</text:p>
      <text:h text:style-name="Heading_20_3" text:outline-level="3">Pronunciation Coach</text:h>
      <text:p text:style-name="Text_20_body">Speech training.</text:p>
      <text:h text:style-name="Heading_20_3" text:outline-level="3">Grammar Hub</text:h>
      <text:p text:style-name="Text_20_body">Grammar correction.</text:p>
      <text:p text:style-name="Horizontal_20_Line"/>
      <text:h text:style-name="Heading_20_2" text:outline-level="2">Testimonials</text:h>
      <text:p text:style-name="Text_20_body">Student reviews.</text:p>
      <text:p text:style-name="Horizontal_20_Line"/>
      <text:h text:style-name="Heading_20_2" text:outline-level="2">Footer</text:h>
      <text:p text:style-name="Text_20_body">Links:</text:p>
      <text:list text:style-name="L11">
        <text:list-item>
          <text:p text:style-name="P12">About</text:p>
        </text:list-item>
        <text:list-item>
          <text:p text:style-name="P12">Contact</text:p>
        </text:list-item>
        <text:list-item>
          <text:p text:style-name="P12">Privacy Policy</text:p>
        </text:list-item>
        <text:list-item>
          <text:p text:style-name="P12">Terms</text:p>
        </text:list-item>
        <text:list-item>
          <text:p text:style-name="P12"><text:soft-page-break/>FAQ</text:p>
        </text:list-item>
      </text:list>
      <text:p text:style-name="Text_20_body">Social Media:</text:p>
      <text:list text:style-name="L12">
        <text:list-item>
          <text:p text:style-name="P13">Facebook</text:p>
        </text:list-item>
        <text:list-item>
          <text:p text:style-name="P13">Instagram</text:p>
        </text:list-item>
        <text:list-item>
          <text:p text:style-name="P13">LinkedIn</text:p>
        </text:list-item>
        <text:list-item>
          <text:p text:style-name="P13">YouTube</text:p>
        </text:list-item>
      </text:list>
      <text:p text:style-name="Horizontal_20_Line"/>
      <text:h text:style-name="Heading_20_1" text:outline-level="1">9. Authentication System</text:h>
      <text:h text:style-name="Heading_20_2" text:outline-level="2">Login</text:h>
      <text:p text:style-name="Text_20_body">Fields:</text:p>
      <text:list text:style-name="L13">
        <text:list-item>
          <text:p text:style-name="P14">Email</text:p>
        </text:list-item>
        <text:list-item>
          <text:p text:style-name="P14">Password</text:p>
        </text:list-item>
      </text:list>
      <text:p text:style-name="Text_20_body">Buttons:</text:p>
      <text:list text:style-name="L14">
        <text:list-item>
          <text:p text:style-name="P15">Login</text:p>
        </text:list-item>
        <text:list-item>
          <text:p text:style-name="P15">Google Login</text:p>
        </text:list-item>
        <text:list-item>
          <text:p text:style-name="P15">Forgot Password</text:p>
        </text:list-item>
      </text:list>
      <text:p text:style-name="Horizontal_20_Line"/>
      <text:h text:style-name="Heading_20_2" text:outline-level="2">Register</text:h>
      <text:p text:style-name="Text_20_body">Fields:</text:p>
      <text:list text:style-name="L15">
        <text:list-item>
          <text:p text:style-name="P16">Name</text:p>
        </text:list-item>
        <text:list-item>
          <text:p text:style-name="P16">Username</text:p>
        </text:list-item>
        <text:list-item>
          <text:p text:style-name="P16">Email</text:p>
        </text:list-item>
        <text:list-item>
          <text:p text:style-name="P16">Password</text:p>
        </text:list-item>
        <text:list-item>
          <text:p text:style-name="P16">Confirm Password</text:p>
        </text:list-item>
      </text:list>
      <text:p text:style-name="Horizontal_20_Line"/>
      <text:h text:style-name="Heading_20_1" text:outline-level="1">10. User Dashboard</text:h>
      <text:p text:style-name="Text_20_body">After Login</text:p>
      <text:p text:style-name="Text_20_body">Contains:</text:p>
      <text:h text:style-name="Heading_20_3" text:outline-level="3"><text:soft-page-break/>Welcome Section</text:h>
      <text:p text:style-name="P8"><text:span text:style-name="Source_20_Text">Welcome Back, John!</text:span></text:p>
      <text:h text:style-name="Heading_20_3" text:outline-level="3">Learning Progress</text:h>
      <text:p text:style-name="Text_20_body">Progress Bar</text:p>
      <text:h text:style-name="Heading_20_3" text:outline-level="3">Quick Access</text:h>
      <text:p text:style-name="Text_20_body">Cards:</text:p>
      <text:list text:style-name="L16">
        <text:list-item>
          <text:p text:style-name="P17">Translate</text:p>
        </text:list-item>
        <text:list-item>
          <text:p text:style-name="P17">Learn</text:p>
        </text:list-item>
        <text:list-item>
          <text:p text:style-name="P17">Vocabulary</text:p>
        </text:list-item>
        <text:list-item>
          <text:p text:style-name="P17">AI Tutor</text:p>
        </text:list-item>
      </text:list>
      <text:p text:style-name="Horizontal_20_Line"/>
      <text:h text:style-name="Heading_20_1" text:outline-level="1">11. Translation Module</text:h>
      <text:p text:style-name="Text_20_body">Core Feature</text:p>
      <text:p text:style-name="Horizontal_20_Line"/>
      <text:h text:style-name="Heading_20_2" text:outline-level="2">Input Area</text:h>
      <text:h text:style-name="Heading_20_3" text:outline-level="3">Source Language</text:h>
      <text:p text:style-name="Text_20_body">Dropdown</text:p>
      <text:h text:style-name="Heading_20_3" text:outline-level="3">Target Language</text:h>
      <text:p text:style-name="Text_20_body">Dropdown</text:p>
      <text:h text:style-name="Heading_20_3" text:outline-level="3">Text Input</text:h>
      <text:p text:style-name="Text_20_body">Textarea</text:p>
      <text:h text:style-name="Heading_20_3" text:outline-level="3">Translate Button</text:h>
      <text:p text:style-name="Horizontal_20_Line"/>
      <text:h text:style-name="Heading_20_2" text:outline-level="2">Output Area</text:h>
      <text:p text:style-name="Text_20_body">Translated Text</text:p>
      <text:p text:style-name="Text_20_body">Buttons:</text:p>
      <text:list text:style-name="L17">
        <text:list-item>
          <text:p text:style-name="P18">Copy</text:p>
        </text:list-item>
        <text:list-item>
          <text:p text:style-name="P18">Download</text:p>
        </text:list-item>
        <text:list-item>
          <text:p text:style-name="P18"><text:soft-page-break/>Listen</text:p>
        </text:list-item>
        <text:list-item>
          <text:p text:style-name="P18">Share</text:p>
        </text:list-item>
      </text:list>
      <text:p text:style-name="Horizontal_20_Line"/>
      <text:h text:style-name="Heading_20_2" text:outline-level="2">Extra Features</text:h>
      <text:h text:style-name="Heading_20_3" text:outline-level="3">Detect Language</text:h>
      <text:p text:style-name="Text_20_body">Automatic detection.</text:p>
      <text:h text:style-name="Heading_20_3" text:outline-level="3">Speech Input</text:h>
      <text:p text:style-name="Text_20_body">Voice recognition.</text:p>
      <text:h text:style-name="Heading_20_3" text:outline-level="3">Speech Output</text:h>
      <text:p text:style-name="Text_20_body">Text-to-speech.</text:p>
      <text:h text:style-name="Heading_20_3" text:outline-level="3">Translation History</text:h>
      <text:p text:style-name="Text_20_body">Recent translations.</text:p>
      <text:p text:style-name="Horizontal_20_Line"/>
      <text:h text:style-name="Heading_20_1" text:outline-level="1">12. Supported Languages</text:h>
      <text:p text:style-name="Text_20_body">Example:</text:p>
      <text:list text:style-name="L18">
        <text:list-item>
          <text:p text:style-name="P19">English</text:p>
        </text:list-item>
        <text:list-item>
          <text:p text:style-name="P19">Sinhala</text:p>
        </text:list-item>
        <text:list-item>
          <text:p text:style-name="P19">Tamil</text:p>
        </text:list-item>
        <text:list-item>
          <text:p text:style-name="P19">French</text:p>
        </text:list-item>
        <text:list-item>
          <text:p text:style-name="P19">German</text:p>
        </text:list-item>
        <text:list-item>
          <text:p text:style-name="P19">Japanese</text:p>
        </text:list-item>
        <text:list-item>
          <text:p text:style-name="P19">Chinese</text:p>
        </text:list-item>
        <text:list-item>
          <text:p text:style-name="P19">Korean</text:p>
        </text:list-item>
        <text:list-item>
          <text:p text:style-name="P19">Arabic</text:p>
        </text:list-item>
        <text:list-item>
          <text:p text:style-name="P19">Spanish</text:p>
        </text:list-item>
      </text:list>
      <text:p text:style-name="Text_20_body">Expandable later.</text:p>
      <text:p text:style-name="Horizontal_20_Line"/>
      <text:h text:style-name="Heading_20_1" text:outline-level="1"><text:soft-page-break/>13. Language Learning Module</text:h>
      <text:h text:style-name="Heading_20_2" text:outline-level="2">Language Selection</text:h>
      <text:p text:style-name="Text_20_body">Cards:</text:p>
      <text:list text:style-name="L19">
        <text:list-item>
          <text:p text:style-name="P20">English</text:p>
        </text:list-item>
        <text:list-item>
          <text:p text:style-name="P20">Japanese</text:p>
        </text:list-item>
        <text:list-item>
          <text:p text:style-name="P20">Korean</text:p>
        </text:list-item>
        <text:list-item>
          <text:p text:style-name="P20">French</text:p>
        </text:list-item>
        <text:list-item>
          <text:p text:style-name="P20">Spanish</text:p>
        </text:list-item>
      </text:list>
      <text:p text:style-name="Horizontal_20_Line"/>
      <text:h text:style-name="Heading_20_2" text:outline-level="2">Learning Levels</text:h>
      <text:h text:style-name="Heading_20_3" text:outline-level="3">Beginner</text:h>
      <text:h text:style-name="Heading_20_3" text:outline-level="3">Intermediate</text:h>
      <text:h text:style-name="Heading_20_3" text:outline-level="3">Advanced</text:h>
      <text:p text:style-name="Horizontal_20_Line"/>
      <text:h text:style-name="Heading_20_1" text:outline-level="1">14. Lesson Structure</text:h>
      <text:p text:style-name="Text_20_body">Each Lesson Contains:</text:p>
      <text:h text:style-name="Heading_20_2" text:outline-level="2">Vocabulary</text:h>
      <text:p text:style-name="Text_20_body">Words</text:p>
      <text:h text:style-name="Heading_20_2" text:outline-level="2">Grammar</text:h>
      <text:p text:style-name="Text_20_body">Rules</text:p>
      <text:h text:style-name="Heading_20_2" text:outline-level="2">Pronunciation</text:h>
      <text:p text:style-name="Text_20_body">Audio</text:p>
      <text:h text:style-name="Heading_20_2" text:outline-level="2">Quiz</text:h>
      <text:p text:style-name="Text_20_body">Questions</text:p>
      <text:h text:style-name="Heading_20_2" text:outline-level="2"><text:soft-page-break/>Practice</text:h>
      <text:p text:style-name="Text_20_body">Exercises</text:p>
      <text:p text:style-name="Horizontal_20_Line"/>
      <text:h text:style-name="Heading_20_1" text:outline-level="1">15. Vocabulary Builder</text:h>
      <text:p text:style-name="Text_20_body">Features:</text:p>
      <text:h text:style-name="Heading_20_3" text:outline-level="3">Daily Words</text:h>
      <text:p text:style-name="Text_20_body">10 new words.</text:p>
      <text:h text:style-name="Heading_20_3" text:outline-level="3">Flashcards</text:h>
      <text:p text:style-name="Text_20_body">Flip animation.</text:p>
      <text:h text:style-name="Heading_20_3" text:outline-level="3">Favorite Words</text:h>
      <text:p text:style-name="Text_20_body">Save words.</text:p>
      <text:h text:style-name="Heading_20_3" text:outline-level="3">Revision System</text:h>
      <text:p text:style-name="Text_20_body">Spaced repetition.</text:p>
      <text:p text:style-name="Horizontal_20_Line"/>
      <text:h text:style-name="Heading_20_1" text:outline-level="1">16. Grammar Center</text:h>
      <text:p text:style-name="Text_20_body">Modules:</text:p>
      <text:h text:style-name="Heading_20_3" text:outline-level="3">Tenses</text:h>
      <text:h text:style-name="Heading_20_3" text:outline-level="3">Sentence Structure</text:h>
      <text:h text:style-name="Heading_20_3" text:outline-level="3">Articles</text:h>
      <text:h text:style-name="Heading_20_3" text:outline-level="3">Active/Passive</text:h>
      <text:h text:style-name="Heading_20_3" text:outline-level="3">Direct/Indirect</text:h>
      <text:h text:style-name="Heading_20_3" text:outline-level="3">Punctuation</text:h>
      <text:p text:style-name="Horizontal_20_Line"/>
      <text:h text:style-name="Heading_20_1" text:outline-level="1">17. Pronunciation Trainer</text:h>
      <text:p text:style-name="Text_20_body">Uses microphone.</text:p>
      <text:p text:style-name="Text_20_body">Features:</text:p>
      <text:list text:style-name="L20">
        <text:list-item>
          <text:p text:style-name="P21"><text:soft-page-break/>Speak Word</text:p>
        </text:list-item>
        <text:list-item>
          <text:p text:style-name="P21">AI Evaluation</text:p>
        </text:list-item>
        <text:list-item>
          <text:p text:style-name="P21">Accuracy Score</text:p>
        </text:list-item>
        <text:list-item>
          <text:p text:style-name="P21">Feedback</text:p>
        </text:list-item>
      </text:list>
      <text:p text:style-name="Text_20_body">Example:</text:p>
      <text:p text:style-name="P8"><text:span text:style-name="Source_20_Text">Accuracy: 87%</text:span></text:p>
      <text:p text:style-name="Horizontal_20_Line"/>
      <text:h text:style-name="Heading_20_1" text:outline-level="1">18. AI Tutor Section</text:h>
      <text:p text:style-name="Text_20_body">Chat Interface</text:p>
      <text:p text:style-name="Text_20_body">Example:</text:p>
      <text:p text:style-name="Preformatted_20_Text"><text:span text:style-name="Source_20_Text">User:</text:span></text:p>
      <text:p text:style-name="Preformatted_20_Text"><text:span text:style-name="Source_20_Text">Teach me Japanese greetings</text:span></text:p>
      <text:p text:style-name="Preformatted_20_Text"/>
      <text:p text:style-name="Preformatted_20_Text"><text:span text:style-name="Source_20_Text">AI:</text:span></text:p>
      <text:p text:style-name="P8"><text:span text:style-name="Source_20_Text">Let's begin...</text:span></text:p>
      <text:p text:style-name="Text_20_body">Features:</text:p>
      <text:list text:style-name="L21">
        <text:list-item>
          <text:p text:style-name="P22">Conversation Practice</text:p>
        </text:list-item>
        <text:list-item>
          <text:p text:style-name="P22">Grammar Questions</text:p>
        </text:list-item>
        <text:list-item>
          <text:p text:style-name="P22">Vocabulary Questions</text:p>
        </text:list-item>
        <text:list-item>
          <text:p text:style-name="P22">Translation Help</text:p>
        </text:list-item>
      </text:list>
      <text:p text:style-name="Horizontal_20_Line"/>
      <text:h text:style-name="Heading_20_1" text:outline-level="1">19. Quiz System</text:h>
      <text:p text:style-name="Text_20_body">Types:</text:p>
      <text:h text:style-name="Heading_20_3" text:outline-level="3">MCQ</text:h>
      <text:h text:style-name="Heading_20_3" text:outline-level="3">Fill Blank</text:h>
      <text:h text:style-name="Heading_20_3" text:outline-level="3">Matching</text:h>
      <text:h text:style-name="Heading_20_3" text:outline-level="3">Listening</text:h>
      <text:h text:style-name="Heading_20_3" text:outline-level="3">Speaking</text:h>
      <text:p text:style-name="Horizontal_20_Line"/>
      <text:h text:style-name="Heading_20_1" text:outline-level="1"><text:soft-page-break/>20. Progress Tracker</text:h>
      <text:p text:style-name="Text_20_body">Displays:</text:p>
      <text:h text:style-name="Heading_20_3" text:outline-level="3">Completed Lessons</text:h>
      <text:h text:style-name="Heading_20_3" text:outline-level="3">Quiz Scores</text:h>
      <text:h text:style-name="Heading_20_3" text:outline-level="3">Vocabulary Learned</text:h>
      <text:h text:style-name="Heading_20_3" text:outline-level="3">Learning Streak</text:h>
      <text:p text:style-name="Text_20_body">Charts:</text:p>
      <text:list text:style-name="L22">
        <text:list-item>
          <text:p text:style-name="P23">Weekly Progress</text:p>
        </text:list-item>
        <text:list-item>
          <text:p text:style-name="P23">Monthly Progress</text:p>
        </text:list-item>
      </text:list>
      <text:p text:style-name="Horizontal_20_Line"/>
      <text:h text:style-name="Heading_20_1" text:outline-level="1">21. Community Forum</text:h>
      <text:p text:style-name="Text_20_body">Users can:</text:p>
      <text:list text:style-name="L23">
        <text:list-item>
          <text:p text:style-name="P24">Ask Questions</text:p>
        </text:list-item>
        <text:list-item>
          <text:p text:style-name="P24">Share Tips</text:p>
        </text:list-item>
        <text:list-item>
          <text:p text:style-name="P24">Discuss Languages</text:p>
        </text:list-item>
      </text:list>
      <text:p text:style-name="Text_20_body">Categories:</text:p>
      <text:list text:style-name="L24">
        <text:list-item>
          <text:p text:style-name="P25">English</text:p>
        </text:list-item>
        <text:list-item>
          <text:p text:style-name="P25">Japanese</text:p>
        </text:list-item>
        <text:list-item>
          <text:p text:style-name="P25">Korean</text:p>
        </text:list-item>
        <text:list-item>
          <text:p text:style-name="P25">French</text:p>
        </text:list-item>
      </text:list>
      <text:p text:style-name="Horizontal_20_Line"/>
      <text:h text:style-name="Heading_20_1" text:outline-level="1">22. User Profile</text:h>
      <text:p text:style-name="Text_20_body">Contains:</text:p>
      <text:h text:style-name="Heading_20_3" text:outline-level="3"><text:soft-page-break/>Profile Picture</text:h>
      <text:h text:style-name="Heading_20_3" text:outline-level="3">Name</text:h>
      <text:h text:style-name="Heading_20_3" text:outline-level="3">Country</text:h>
      <text:h text:style-name="Heading_20_3" text:outline-level="3">Languages Learning</text:h>
      <text:h text:style-name="Heading_20_3" text:outline-level="3">Achievement Badges</text:h>
      <text:p text:style-name="Horizontal_20_Line"/>
      <text:h text:style-name="Heading_20_1" text:outline-level="1">23. Achievement System</text:h>
      <text:p text:style-name="Text_20_body">Badges:</text:p>
      <text:p text:style-name="Text_20_body">🥉 Beginner</text:p>
      <text:p text:style-name="Text_20_body">🥈 Intermediate</text:p>
      <text:p text:style-name="Text_20_body">🥇 Advanced</text:p>
      <text:p text:style-name="Text_20_body">🏆 Master Linguist</text:p>
      <text:p text:style-name="Text_20_body">🔥 30-Day Streak</text:p>
      <text:p text:style-name="Horizontal_20_Line"/>
      <text:h text:style-name="Heading_20_1" text:outline-level="1">24. Settings Page</text:h>
      <text:p text:style-name="Text_20_body">Options:</text:p>
      <text:h text:style-name="Heading_20_3" text:outline-level="3">Theme</text:h>
      <text:list text:style-name="L25">
        <text:list-item>
          <text:p text:style-name="P26">Light</text:p>
        </text:list-item>
        <text:list-item>
          <text:p text:style-name="P26">Metallic Light</text:p>
        </text:list-item>
      </text:list>
      <text:h text:style-name="Heading_20_3" text:outline-level="3">Notifications</text:h>
      <text:h text:style-name="Heading_20_3" text:outline-level="3">Language Preference</text:h>
      <text:h text:style-name="Heading_20_3" text:outline-level="3">Privacy Settings</text:h>
      <text:p text:style-name="Horizontal_20_Line"/>
      <text:h text:style-name="Heading_20_1" text:outline-level="1">25. Admin Panel</text:h>
      <text:p text:style-name="Text_20_body">Separate Dashboard</text:p>
      <text:p text:style-name="Horizontal_20_Line"/>
      <text:h text:style-name="Heading_20_2" text:outline-level="2"><text:soft-page-break/>Admin Features</text:h>
      <text:h text:style-name="Heading_20_3" text:outline-level="3">Manage Users</text:h>
      <text:h text:style-name="Heading_20_3" text:outline-level="3">Manage Lessons</text:h>
      <text:h text:style-name="Heading_20_3" text:outline-level="3">Manage Languages</text:h>
      <text:h text:style-name="Heading_20_3" text:outline-level="3">Manage Forum</text:h>
      <text:h text:style-name="Heading_20_3" text:outline-level="3">Analytics</text:h>
      <text:h text:style-name="Heading_20_3" text:outline-level="3">Reports</text:h>
      <text:p text:style-name="Horizontal_20_Line"/>
      <text:h text:style-name="Heading_20_1" text:outline-level="1">26. Database Design</text:h>
      <text:h text:style-name="Heading_20_2" text:outline-level="2">Users Table</text:h>
      <text:p text:style-name="Preformatted_20_Text"><text:span text:style-name="Source_20_Text">users</text:span></text:p>
      <text:p text:style-name="Preformatted_20_Text"><text:span text:style-name="Source_20_Text">-----</text:span></text:p>
      <text:p text:style-name="Preformatted_20_Text"><text:span text:style-name="Source_20_Text">id</text:span></text:p>
      <text:p text:style-name="Preformatted_20_Text"><text:span text:style-name="Source_20_Text">name</text:span></text:p>
      <text:p text:style-name="Preformatted_20_Text"><text:span text:style-name="Source_20_Text">username</text:span></text:p>
      <text:p text:style-name="Preformatted_20_Text"><text:span text:style-name="Source_20_Text">email</text:span></text:p>
      <text:p text:style-name="Preformatted_20_Text"><text:span text:style-name="Source_20_Text">password</text:span></text:p>
      <text:p text:style-name="Preformatted_20_Text"><text:span text:style-name="Source_20_Text">profile_picture</text:span></text:p>
      <text:p text:style-name="P8"><text:span text:style-name="Source_20_Text">created_at</text:span></text:p>
      <text:p text:style-name="Horizontal_20_Line"/>
      <text:h text:style-name="Heading_20_2" text:outline-level="2">Languages</text:h>
      <text:p text:style-name="Preformatted_20_Text"><text:span text:style-name="Source_20_Text">languages</text:span></text:p>
      <text:p text:style-name="Preformatted_20_Text"><text:span text:style-name="Source_20_Text">---------</text:span></text:p>
      <text:p text:style-name="Preformatted_20_Text"><text:span text:style-name="Source_20_Text">id</text:span></text:p>
      <text:p text:style-name="Preformatted_20_Text"><text:span text:style-name="Source_20_Text">name</text:span></text:p>
      <text:p text:style-name="Preformatted_20_Text"><text:span text:style-name="Source_20_Text">code</text:span></text:p>
      <text:p text:style-name="P8"><text:span text:style-name="Source_20_Text">flag</text:span></text:p>
      <text:p text:style-name="Horizontal_20_Line"/>
      <text:h text:style-name="Heading_20_2" text:outline-level="2">Lessons</text:h>
      <text:p text:style-name="Preformatted_20_Text"><text:span text:style-name="Source_20_Text">lessons</text:span></text:p>
      <text:p text:style-name="Preformatted_20_Text"><text:span text:style-name="Source_20_Text">--------</text:span></text:p>
      <text:p text:style-name="Preformatted_20_Text"><text:span text:style-name="Source_20_Text">id</text:span></text:p>
      <text:p text:style-name="Preformatted_20_Text"><text:span text:style-name="Source_20_Text">language_id</text:span></text:p>
      <text:p text:style-name="Preformatted_20_Text"><text:span text:style-name="Source_20_Text">title</text:span></text:p>
      <text:p text:style-name="Preformatted_20_Text"><text:span text:style-name="Source_20_Text">level</text:span></text:p>
      <text:p text:style-name="P8"><text:span text:style-name="Source_20_Text">content</text:span></text:p>
      <text:p text:style-name="Horizontal_20_Line"/>
      <text:h text:style-name="Heading_20_2" text:outline-level="2"><text:soft-page-break/>Vocabulary</text:h>
      <text:p text:style-name="Preformatted_20_Text"><text:span text:style-name="Source_20_Text">vocabulary</text:span></text:p>
      <text:p text:style-name="Preformatted_20_Text"><text:span text:style-name="Source_20_Text">-----------</text:span></text:p>
      <text:p text:style-name="Preformatted_20_Text"><text:span text:style-name="Source_20_Text">id</text:span></text:p>
      <text:p text:style-name="Preformatted_20_Text"><text:span text:style-name="Source_20_Text">language_id</text:span></text:p>
      <text:p text:style-name="Preformatted_20_Text"><text:span text:style-name="Source_20_Text">word</text:span></text:p>
      <text:p text:style-name="Preformatted_20_Text"><text:span text:style-name="Source_20_Text">meaning</text:span></text:p>
      <text:p text:style-name="P8"><text:span text:style-name="Source_20_Text">audio</text:span></text:p>
      <text:p text:style-name="Horizontal_20_Line"/>
      <text:h text:style-name="Heading_20_2" text:outline-level="2">Quizzes</text:h>
      <text:p text:style-name="Preformatted_20_Text"><text:span text:style-name="Source_20_Text">quizzes</text:span></text:p>
      <text:p text:style-name="Preformatted_20_Text"><text:span text:style-name="Source_20_Text">--------</text:span></text:p>
      <text:p text:style-name="Preformatted_20_Text"><text:span text:style-name="Source_20_Text">id</text:span></text:p>
      <text:p text:style-name="Preformatted_20_Text"><text:span text:style-name="Source_20_Text">lesson_id</text:span></text:p>
      <text:p text:style-name="Preformatted_20_Text"><text:span text:style-name="Source_20_Text">question</text:span></text:p>
      <text:p text:style-name="P8"><text:span text:style-name="Source_20_Text">answer</text:span></text:p>
      <text:p text:style-name="Horizontal_20_Line"/>
      <text:h text:style-name="Heading_20_2" text:outline-level="2">Progress</text:h>
      <text:p text:style-name="Preformatted_20_Text"><text:span text:style-name="Source_20_Text">progress</text:span></text:p>
      <text:p text:style-name="Preformatted_20_Text"><text:span text:style-name="Source_20_Text">---------</text:span></text:p>
      <text:p text:style-name="Preformatted_20_Text"><text:span text:style-name="Source_20_Text">id</text:span></text:p>
      <text:p text:style-name="Preformatted_20_Text"><text:span text:style-name="Source_20_Text">user_id</text:span></text:p>
      <text:p text:style-name="Preformatted_20_Text"><text:span text:style-name="Source_20_Text">lesson_id</text:span></text:p>
      <text:p text:style-name="P8"><text:span text:style-name="Source_20_Text">score</text:span></text:p>
      <text:p text:style-name="Horizontal_20_Line"/>
      <text:h text:style-name="Heading_20_1" text:outline-level="1">27. Backend API Structure</text:h>
      <text:p text:style-name="Preformatted_20_Text"><text:span text:style-name="Source_20_Text">/api/auth</text:span></text:p>
      <text:p text:style-name="Preformatted_20_Text"><text:span text:style-name="Source_20_Text">/api/users</text:span></text:p>
      <text:p text:style-name="Preformatted_20_Text"><text:span text:style-name="Source_20_Text">/api/translate</text:span></text:p>
      <text:p text:style-name="Preformatted_20_Text"><text:span text:style-name="Source_20_Text">/api/lessons</text:span></text:p>
      <text:p text:style-name="Preformatted_20_Text"><text:span text:style-name="Source_20_Text">/api/vocabulary</text:span></text:p>
      <text:p text:style-name="Preformatted_20_Text"><text:span text:style-name="Source_20_Text">/api/quiz</text:span></text:p>
      <text:p text:style-name="Preformatted_20_Text"><text:span text:style-name="Source_20_Text">/api/progress</text:span></text:p>
      <text:p text:style-name="Preformatted_20_Text"><text:span text:style-name="Source_20_Text">/api/forum</text:span></text:p>
      <text:p text:style-name="P8"><text:span text:style-name="Source_20_Text">/api/admin</text:span></text:p>
      <text:p text:style-name="Horizontal_20_Line"/>
      <text:h text:style-name="Heading_20_1" text:outline-level="1">28. Security Features</text:h>
      <text:h text:style-name="Heading_20_3" text:outline-level="3">Password Hashing</text:h>
      <text:p text:style-name="Text_20_body">bcrypt</text:p>
      <text:h text:style-name="Heading_20_3" text:outline-level="3"><text:soft-page-break/>JWT Authentication</text:h>
      <text:p text:style-name="Text_20_body">Token-based login</text:p>
      <text:h text:style-name="Heading_20_3" text:outline-level="3">HTTPS</text:h>
      <text:p text:style-name="Text_20_body">SSL Protection</text:p>
      <text:h text:style-name="Heading_20_3" text:outline-level="3">Input Validation</text:h>
      <text:p text:style-name="Text_20_body">Prevent injections</text:p>
      <text:h text:style-name="Heading_20_3" text:outline-level="3">Rate Limiting</text:h>
      <text:p text:style-name="Text_20_body">API abuse prevention</text:p>
      <text:p text:style-name="Horizontal_20_Line"/>
      <text:h text:style-name="Heading_20_1" text:outline-level="1">29. Performance Features</text:h>
      <text:h text:style-name="Heading_20_3" text:outline-level="3">Lazy Loading</text:h>
      <text:h text:style-name="Heading_20_3" text:outline-level="3">Image Optimization</text:h>
      <text:h text:style-name="Heading_20_3" text:outline-level="3">Cache Management</text:h>
      <text:h text:style-name="Heading_20_3" text:outline-level="3">Minified Files</text:h>
      <text:h text:style-name="Heading_20_3" text:outline-level="3">CDN Support</text:h>
      <text:p text:style-name="Horizontal_20_Line"/>
      <text:h text:style-name="Heading_20_1" text:outline-level="1">30. Animations</text:h>
      <text:h text:style-name="Heading_20_3" text:outline-level="3">Hero Parrot</text:h>
      <text:p text:style-name="Text_20_body">Floating animation.</text:p>
      <text:h text:style-name="Heading_20_3" text:outline-level="3">Cards</text:h>
      <text:p text:style-name="Text_20_body">Hover lift effect.</text:p>
      <text:h text:style-name="Heading_20_3" text:outline-level="3">Buttons</text:h>
      <text:p text:style-name="Text_20_body">Glow effect.</text:p>
      <text:h text:style-name="Heading_20_3" text:outline-level="3">Progress Bars</text:h>
      <text:p text:style-name="Text_20_body">Smooth fill animation.</text:p>
      <text:p text:style-name="Horizontal_20_Line"/>
      <text:h text:style-name="Heading_20_1" text:outline-level="1"><text:soft-page-break/>31. Accessibility Features</text:h>
      <text:list text:style-name="L26">
        <text:list-item>
          <text:p text:style-name="P27">Keyboard Navigation</text:p>
        </text:list-item>
        <text:list-item>
          <text:p text:style-name="P27">Screen Reader Support</text:p>
        </text:list-item>
        <text:list-item>
          <text:p text:style-name="P27">High Contrast Mode</text:p>
        </text:list-item>
        <text:list-item>
          <text:p text:style-name="P27">Responsive Design</text:p>
        </text:list-item>
      </text:list>
      <text:p text:style-name="Horizontal_20_Line"/>
      <text:h text:style-name="Heading_20_1" text:outline-level="1">32. Mobile Responsive Design</text:h>
      <text:h text:style-name="Heading_20_3" text:outline-level="3">Breakpoints</text:h>
      <text:p text:style-name="Preformatted_20_Text"><text:span text:style-name="Source_20_Text">320px</text:span></text:p>
      <text:p text:style-name="Preformatted_20_Text"><text:span text:style-name="Source_20_Text">480px</text:span></text:p>
      <text:p text:style-name="Preformatted_20_Text"><text:span text:style-name="Source_20_Text">768px</text:span></text:p>
      <text:p text:style-name="Preformatted_20_Text"><text:span text:style-name="Source_20_Text">1024px</text:span></text:p>
      <text:p text:style-name="P8"><text:span text:style-name="Source_20_Text">1440px</text:span></text:p>
      <text:p text:style-name="Text_20_body">Supports:</text:p>
      <text:list text:style-name="L27">
        <text:list-item>
          <text:p text:style-name="P28">Mobile</text:p>
        </text:list-item>
        <text:list-item>
          <text:p text:style-name="P28">Tablet</text:p>
        </text:list-item>
        <text:list-item>
          <text:p text:style-name="P28">Laptop</text:p>
        </text:list-item>
        <text:list-item>
          <text:p text:style-name="P28">Desktop</text:p>
        </text:list-item>
      </text:list>
      <text:p text:style-name="Horizontal_20_Line"/>
      <text:h text:style-name="Heading_20_1" text:outline-level="1">33. Folder Structure</text:h>
      <text:p text:style-name="Preformatted_20_Text"><text:span text:style-name="Source_20_Text">spaKo/</text:span></text:p>
      <text:p text:style-name="Preformatted_20_Text"><text:span text:style-name="Source_20_Text">│</text:span></text:p>
      <text:p text:style-name="Preformatted_20_Text"><text:span text:style-name="Source_20_Text">├── frontend/</text:span></text:p>
      <text:p text:style-name="Preformatted_20_Text"><text:span text:style-name="Source_20_Text">│ <text:s text:c="2"/>├── index.html</text:span></text:p>
      <text:p text:style-name="Preformatted_20_Text"><text:span text:style-name="Source_20_Text">│ <text:s text:c="2"/>├── css/</text:span></text:p>
      <text:p text:style-name="Preformatted_20_Text"><text:span text:style-name="Source_20_Text">│ <text:s text:c="2"/>├── js/</text:span></text:p>
      <text:p text:style-name="Preformatted_20_Text"><text:span text:style-name="Source_20_Text">│ <text:s text:c="2"/>├── assets/</text:span></text:p>
      <text:p text:style-name="Preformatted_20_Text"><text:span text:style-name="Source_20_Text">│ <text:s text:c="2"/>│ <text:s text:c="2"/>├── images/</text:span></text:p>
      <text:p text:style-name="Preformatted_20_Text"><text:span text:style-name="Source_20_Text">│ <text:s text:c="2"/>│ <text:s text:c="2"/>├── icons/</text:span></text:p>
      <text:p text:style-name="Preformatted_20_Text"><text:span text:style-name="Source_20_Text">│ <text:s text:c="2"/>│ <text:s text:c="2"/>└── audio/</text:span></text:p>
      <text:p text:style-name="Preformatted_20_Text"><text:span text:style-name="Source_20_Text">│</text:span></text:p>
      <text:p text:style-name="Preformatted_20_Text"><text:span text:style-name="Source_20_Text">├── backend/</text:span></text:p>
      <text:p text:style-name="Preformatted_20_Text"><text:span text:style-name="Source_20_Text">│ <text:s text:c="2"/>├── server.js</text:span></text:p>
      <text:p text:style-name="Preformatted_20_Text"><text:span text:style-name="Source_20_Text">│ <text:s text:c="2"/>├── routes/</text:span></text:p>
      <text:p text:style-name="Preformatted_20_Text"><text:span text:style-name="Source_20_Text">│ <text:s text:c="2"/>├── controllers/</text:span></text:p>
      <text:p text:style-name="Preformatted_20_Text"><text:span text:style-name="Source_20_Text">│ <text:s text:c="2"/>├── middleware/</text:span></text:p>
      <text:p text:style-name="Preformatted_20_Text"><text:span text:style-name="Source_20_Text">│ <text:s text:c="2"/>├── models/</text:span></text:p>
      <text:p text:style-name="Preformatted_20_Text"><text:span text:style-name="Source_20_Text">│ <text:s text:c="2"/>└── config/</text:span></text:p>
      <text:p text:style-name="Preformatted_20_Text"><text:span text:style-name="Source_20_Text">│</text:span></text:p>
      <text:p text:style-name="Preformatted_20_Text"><text:span text:style-name="Source_20_Text">├── database/</text:span></text:p>
      <text:p text:style-name="Preformatted_20_Text"><text:span text:style-name="Source_20_Text">│ <text:s text:c="2"/>└── spako.sql</text:span></text:p>
      <text:p text:style-name="Preformatted_20_Text"><text:span text:style-name="Source_20_Text">│</text:span></text:p>
      <text:p text:style-name="P8"><text:soft-page-break/><text:span text:style-name="Source_20_Text">└── docs/</text:span></text:p>
      <text:p text:style-name="Horizontal_20_Line"/>
      <text:h text:style-name="Heading_20_1" text:outline-level="1">34. Future AI Integrations</text:h>
      <text:list text:style-name="L28">
        <text:list-item>
          <text:p text:style-name="P29">OpenAI Translation Assistant</text:p>
        </text:list-item>
        <text:list-item>
          <text:p text:style-name="P29">AI Voice Coach</text:p>
        </text:list-item>
        <text:list-item>
          <text:p text:style-name="P29">AI Grammar Corrector</text:p>
        </text:list-item>
        <text:list-item>
          <text:p text:style-name="P29">AI Conversation Partner</text:p>
        </text:list-item>
        <text:list-item>
          <text:p text:style-name="P29">AI Pronunciation Analyzer</text:p>
        </text:list-item>
        <text:list-item>
          <text:p text:style-name="P29">AI Personalized Learning Paths</text:p>
        </text:list-item>
      </text:list>
      <text:p text:style-name="Horizontal_20_Line"/>
      <text:h text:style-name="Heading_20_1" text:outline-level="1">35. Assignment Enhancement Features (High Marks Section)</text:h>
      <text:p text:style-name="Text_20_body">To make the project stand out:</text:p>
      <text:p text:style-name="Text_20_body">✅ Animated Metallic 3D Parrot Mascot<text:line-break/>✅ Dark/Light Theme Toggle<text:line-break/>✅ Speech-to-Text Translation<text:line-break/>✅ Text-to-Speech Output<text:line-break/>✅ AI Tutor Chatbot<text:line-break/>✅ User Achievement System<text:line-break/>✅ Daily Learning Challenges<text:line-break/>✅ Progress Analytics Dashboard<text:line-break/>✅ Interactive Flashcards<text:line-break/>✅ Community Discussion Forum<text:line-break/>✅ Mobile Responsive Design<text:line-break/>✅ Professional Metallic UI Design<text:line-break/>✅ Modern Dashboard Experience<text:line-break/>✅ Gamification System<text:line-break/>✅ Language Learning Roadmaps</text:p>
      <text:p text:style-name="Horizontal_20_Line"/>
      <text:h text:style-name="Heading_20_1" text:outline-level="1">Final Vision</text:h>
      <text:p text:style-name="Text_20_body"><text:span text:style-name="Strong_20_Emphasis">spaKo</text:span> should feel like a modern combination of:</text:p>
      <text:list text:style-name="L29">
        <text:list-item>
          <text:p text:style-name="P30">Language Translator</text:p>
        </text:list-item>
        <text:list-item>
          <text:p text:style-name="P30">Duolingo-style Learning Platform</text:p>
        </text:list-item>
        <text:list-item>
          <text:p text:style-name="P30"><text:soft-page-break/>AI Language Assistant</text:p>
        </text:list-item>
        <text:list-item>
          <text:p text:style-name="P30">Community Learning Hub</text:p>
        </text:list-item>
      </text:list>
      <text:p text:style-name="Text_20_body">with a <text:span text:style-name="Strong_20_Emphasis">clean white metallic interface</text:span>, <text:span text:style-name="Strong_20_Emphasis">robotic parrot branding</text:span>, <text:span text:style-name="Strong_20_Emphasis">smooth animations</text:span>, <text:span text:style-name="Strong_20_Emphasis">responsive design</text:span>, and <text:span text:style-name="Strong_20_Emphasis">full-stack architecture</text:span> that looks professional enough for both an academic assignment and a real-world startup prototype. 🦜✨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5T11:05:50.902312100</meta:creation-date>
    <dc:date>2026-06-25T11:11:03.399255000</dc:date>
    <meta:editing-duration>PT5M14S</meta:editing-duration>
    <meta:editing-cycles>1</meta:editing-cycles>
    <meta:document-statistic meta:table-count="2" meta:image-count="0" meta:object-count="0" meta:page-count="19" meta:paragraph-count="481" meta:word-count="1112" meta:character-count="7040" meta:non-whitespace-character-count="6486"/>
    <meta:generator>LibreOffice/26.2.4.2$Windows_X86_64 LibreOffice_project/0229ac93fcf0d7cbc6376066c6f35021cef002dc</meta:generator>
  </office:meta>
</office:document-meta>
</file>